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22b9" officeooo:paragraph-rsid="001822b9"/>
    </style:style>
    <style:style style:name="P2" style:family="paragraph" style:parent-style-name="Text_20_body">
      <style:text-properties officeooo:rsid="001822b9" officeooo:paragraph-rsid="001822b9"/>
    </style:style>
    <style:style style:name="P3" style:family="paragraph" style:parent-style-name="Horizontal_20_Line">
      <style:text-properties officeooo:rsid="001822b9"/>
    </style:style>
    <style:style style:name="P4" style:family="paragraph" style:parent-style-name="Heading_20_3">
      <style:text-properties officeooo:rsid="001822b9"/>
    </style:style>
    <style:style style:name="P5" style:family="paragraph" style:parent-style-name="Text_20_body">
      <style:text-properties officeooo:rsid="001822b9"/>
    </style:style>
    <style:style style:name="P6" style:family="paragraph" style:parent-style-name="Heading_20_1">
      <style:text-properties officeooo:rsid="001822b9"/>
    </style:style>
    <style:style style:name="P7" style:family="paragraph" style:parent-style-name="Heading_20_2">
      <style:paragraph-properties fo:margin-top="0cm" fo:margin-bottom="0.247cm" style:contextual-spacing="false" fo:line-height="115%"/>
      <style:text-properties officeooo:rsid="001822b9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officeooo:rsid="001822b9"/>
    </style:style>
    <style:style style:name="P9" style:family="paragraph" style:parent-style-name="Text_20_body" style:list-style-name="L1">
      <style:text-properties officeooo:rsid="001822b9"/>
    </style:style>
    <style:style style:name="P10" style:family="paragraph" style:parent-style-name="Horizontal_20_Line">
      <style:paragraph-properties fo:margin-top="0cm" fo:margin-bottom="0.247cm" style:contextual-spacing="false" fo:line-height="115%"/>
      <style:text-properties officeooo:rsid="001822b9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officeooo:rsid="001822b9"/>
    </style:style>
    <style:style style:name="P12" style:family="paragraph" style:parent-style-name="Text_20_body" style:list-style-name="L2">
      <style:text-properties officeooo:rsid="001822b9"/>
    </style:style>
    <style:style style:name="P13" style:family="paragraph" style:parent-style-name="Text_20_body" style:list-style-name="L3">
      <style:text-properties officeooo:rsid="001822b9"/>
    </style:style>
    <style:style style:name="P14" style:family="paragraph" style:parent-style-name="Text_20_body" style:list-style-name="L4">
      <style:paragraph-properties fo:margin-top="0cm" fo:margin-bottom="0cm" style:contextual-spacing="false"/>
      <style:text-properties officeooo:rsid="001822b9"/>
    </style:style>
    <style:style style:name="P15" style:family="paragraph" style:parent-style-name="Text_20_body" style:list-style-name="L4">
      <style:text-properties officeooo:rsid="001822b9"/>
    </style:style>
    <style:style style:name="P16" style:family="paragraph" style:parent-style-name="Text_20_body" style:list-style-name="L5">
      <style:text-properties officeooo:rsid="001822b9"/>
    </style:style>
    <style:style style:name="P17" style:family="paragraph" style:parent-style-name="Text_20_body" style:list-style-name="L6">
      <style:paragraph-properties fo:margin-top="0cm" fo:margin-bottom="0cm" style:contextual-spacing="false"/>
      <style:text-properties officeooo:rsid="001822b9"/>
    </style:style>
    <style:style style:name="P18" style:family="paragraph" style:parent-style-name="Text_20_body" style:list-style-name="L6">
      <style:text-properties officeooo:rsid="001822b9"/>
    </style:style>
    <style:style style:name="P19" style:family="paragraph" style:parent-style-name="Text_20_body" style:list-style-name="L7">
      <style:paragraph-properties fo:margin-top="0cm" fo:margin-bottom="0cm" style:contextual-spacing="false"/>
      <style:text-properties officeooo:rsid="001822b9"/>
    </style:style>
    <style:style style:name="P20" style:family="paragraph" style:parent-style-name="Text_20_body" style:list-style-name="L7">
      <style:text-properties officeooo:rsid="001822b9"/>
    </style:style>
    <style:style style:name="P21" style:family="paragraph" style:parent-style-name="Text_20_body" style:list-style-name="L8">
      <style:paragraph-properties fo:margin-top="0cm" fo:margin-bottom="0cm" style:contextual-spacing="false"/>
      <style:text-properties officeooo:rsid="001822b9"/>
    </style:style>
    <style:style style:name="P22" style:family="paragraph" style:parent-style-name="Text_20_body" style:list-style-name="L8">
      <style:text-properties officeooo:rsid="001822b9"/>
    </style:style>
    <style:style style:name="P23" style:family="paragraph" style:parent-style-name="Text_20_body" style:list-style-name="L9">
      <style:text-properties officeooo:rsid="001822b9"/>
    </style:style>
    <style:style style:name="P24" style:family="paragraph" style:parent-style-name="Text_20_body" style:list-style-name="L10">
      <style:text-properties officeooo:rsid="001822b9"/>
    </style:style>
    <style:style style:name="P25" style:family="paragraph" style:parent-style-name="Text_20_body" style:list-style-name="L11">
      <style:paragraph-properties fo:margin-top="0cm" fo:margin-bottom="0cm" style:contextual-spacing="false"/>
      <style:text-properties officeooo:rsid="001822b9"/>
    </style:style>
    <style:style style:name="P26" style:family="paragraph" style:parent-style-name="Text_20_body" style:list-style-name="L11">
      <style:text-properties officeooo:rsid="001822b9"/>
    </style:style>
    <style:style style:name="P27" style:family="paragraph" style:parent-style-name="Text_20_body" style:list-style-name="L12">
      <style:paragraph-properties fo:margin-top="0cm" fo:margin-bottom="0cm" style:contextual-spacing="false"/>
      <style:text-properties officeooo:rsid="001822b9"/>
    </style:style>
    <style:style style:name="P28" style:family="paragraph" style:parent-style-name="Text_20_body" style:list-style-name="L12">
      <style:text-properties officeooo:rsid="001822b9"/>
    </style:style>
    <style:style style:name="P29" style:family="paragraph" style:parent-style-name="Heading_20_1">
      <style:paragraph-properties fo:margin-top="0cm" fo:margin-bottom="0.247cm" style:contextual-spacing="false" fo:line-height="115%"/>
      <style:text-properties officeooo:rsid="001822b9"/>
    </style:style>
    <style:style style:name="P30" style:family="paragraph" style:parent-style-name="Preformatted_20_Text">
      <style:paragraph-properties fo:margin-left="0cm" fo:margin-right="0cm" fo:line-height="115%" fo:text-indent="0cm" style:auto-text-indent="false"/>
      <style:text-properties officeooo:rsid="001822b9"/>
    </style:style>
    <style:style style:name="P31" style:family="paragraph">
      <style:paragraph-properties fo:text-align="center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os proyecto:</text:p>
      <text:p text:style-name="P1"/>
      <text:p text:style-name="P2">Aquí tienes los 3 datasets que hemos comentado para tu proyecto:</text:p>
      <text:p text:style-name="P3"/>
      <text:h text:style-name="P4" text:outline-level="3">1. Dataset principal de canciones Spotify (audio features)</text:h>
      <text:p text:style-name="P5"><text:a xlink:type="simple" xlink:href="https://www.kaggle.com/datasets/maharshipandya/-spotify-tracks-dataset" office:target-frame-name="_new" xlink:show="replace" text:style-name="Internet_20_link" text:visited-style-name="Visited_20_Internet_20_Link">https://www.kaggle.com/datasets/maharshipandya/-spotify-tracks-dataset</text:a></text:p>
      <text:p text:style-name="P3"/>
      <text:h text:style-name="P4" text:outline-level="3">3. Dataset de moods/emociones musicales (para entrenar el modelo)</text:h>
      <text:p text:style-name="P5"><text:a xlink:type="simple" xlink:href="https://www.kaggle.com/datasets/abdullahorzan/moodify-dataset" office:target-frame-name="_new" xlink:show="replace" text:style-name="Internet_20_link" text:visited-style-name="Visited_20_Internet_20_Link">https://www.kaggle.com/datasets/abdullahorzan/moodify-dataset</text:a></text:p>
      <text:p text:style-name="P3"/>
      <text:h text:style-name="P6" text:outline-level="1">Pipeline Resumido del Proyecto (Actualizado)</text:h>
      <text:h text:style-name="P7" text:outline-level="2">1. Obtener múltiples datasets musicales</text:h>
      <text:list text:style-name="L1">
        <text:list-item>
          <text:p text:style-name="P8">Spotify Tracks Dataset (catálogo principal) </text:p>
        </text:list-item>
        <text:list-item>
          <text:p text:style-name="P9">Mood/Emotion Dataset (dataset etiquetado para entrenamiento) </text:p>
        </text:list-item>
      </text:list>
      <text:p text:style-name="P10"/>
      <text:h text:style-name="P7" text:outline-level="2">2. Leer datasets y generar eventos streaming simulados</text:h>
      <text:list text:style-name="L2">
        <text:list-item>
          <text:p text:style-name="P11">Script producer lee filas de los datasets </text:p>
        </text:list-item>
        <text:list-item>
          <text:p text:style-name="P12">Envía canciones a Kafka simulando streaming en tiempo real </text:p>
        </text:list-item>
      </text:list>
      <text:p text:style-name="P10"/>
      <text:h text:style-name="P7" text:outline-level="2">3. Kafka recibe eventos en tiempo real</text:h>
      <text:list text:style-name="L3">
        <text:list-item>
          <text:p text:style-name="P13">Simula llegada continua de nuevas canciones al sistema </text:p>
        </text:list-item>
      </text:list>
      <text:p text:style-name="P10"/>
      <text:h text:style-name="P7" text:outline-level="2">4. Consumer Kafka guarda datos raw en S3 (Bronze Layer)</text:h>
      <text:list text:style-name="L4">
        <text:list-item>
          <text:p text:style-name="P14">Almacenamiento bruto / histórico sin procesar </text:p>
        </text:list-item>
        <text:list-item>
          <text:p text:style-name="P15">Persistencia de datasets originales ingeridos </text:p>
        </text:list-item>
      </text:list>
      <text:p text:style-name="P10"/>
      <text:h text:style-name="P7" text:outline-level="2">5. AWS Lambda detecta nueva subida a S3</text:h>
      <text:list text:style-name="L5">
        <text:list-item>
          <text:p text:style-name="P16">Trigger automático de procesamiento </text:p>
        </text:list-item>
      </text:list>
      <text:p text:style-name="P10"/>
      <text:h text:style-name="P7" text:outline-level="2"><text:soft-page-break/>6. Spark / PySpark procesa Bronze → Silver</text:h>
      <text:list text:style-name="L6">
        <text:list-item>
          <text:p text:style-name="P17">Limpieza de datos </text:p>
        </text:list-item>
        <text:list-item>
          <text:p text:style-name="P17">Tratamiento de nulos </text:p>
        </text:list-item>
        <text:list-item>
          <text:p text:style-name="P17">Corrección de tipos </text:p>
        </text:list-item>
        <text:list-item>
          <text:p text:style-name="P17">Eliminación de duplicados </text:p>
        </text:list-item>
        <text:list-item>
          <text:p text:style-name="P17">Eliminación de columnas irrelevantes </text:p>
        </text:list-item>
        <text:list-item>
          <text:p text:style-name="P18">Normalización de formatos </text:p>
        </text:list-item>
      </text:list>
      <text:p text:style-name="P10"/>
      <text:h text:style-name="P7" text:outline-level="2">7. Spark / PySpark procesa Silver → Gold</text:h>
      <text:list text:style-name="L7">
        <text:list-item>
          <text:p text:style-name="P19">Merge / unificación de datasets cuando proceda </text:p>
        </text:list-item>
        <text:list-item>
          <text:p text:style-name="P19">Feature engineering </text:p>
        </text:list-item>
        <text:list-item>
          <text:p text:style-name="P19">Creación de variables derivadas </text:p>
        </text:list-item>
        <text:list-item>
          <text:p text:style-name="P19">Generación de etiquetas contextuales heurísticas: </text:p>
          <text:list>
            <text:list-item>
              <text:p text:style-name="P19">workout </text:p>
            </text:list-item>
            <text:list-item>
              <text:p text:style-name="P19">study </text:p>
            </text:list-item>
            <text:list-item>
              <text:p text:style-name="P19">party </text:p>
            </text:list-item>
            <text:list-item>
              <text:p text:style-name="P19">sleep </text:p>
            </text:list-item>
            <text:list-item>
              <text:p text:style-name="P19">relax </text:p>
            </text:list-item>
          </text:list>
        </text:list-item>
        <text:list-item>
          <text:p text:style-name="P20">Construcción de dataset final para ML / recomendación </text:p>
        </text:list-item>
      </text:list>
      <text:p text:style-name="P10"/>
      <text:h text:style-name="P7" text:outline-level="2">8. Guardar datos procesados</text:h>
      <text:list text:style-name="L8">
        <text:list-item>
          <text:p text:style-name="P21">RDS → catálogo estructurado final de canciones enriquecidas </text:p>
        </text:list-item>
        <text:list-item>
          <text:p text:style-name="P22">MongoDB → documentos flexibles / metadata adicional / logs / predicciones si procede </text:p>
        </text:list-item>
      </text:list>
      <text:p text:style-name="P10"/>
      <text:h text:style-name="P7" text:outline-level="2">9. Entrenar modelo supervisado de clasificación emocional</text:h>
      <text:list text:style-name="L9">
        <text:list-item>
          <text:p text:style-name="P23">Aprende mood a partir de audio features del Mood Dataset </text:p>
        </text:list-item>
      </text:list>
      <text:p text:style-name="P10"/>
      <text:h text:style-name="P7" text:outline-level="2">10. Aplicar modelo al catálogo completo</text:h>
      <text:list text:style-name="L10">
        <text:list-item>
          <text:p text:style-name="P24">Predicción de mood sobre todas las canciones del catálogo Spotify </text:p>
        </text:list-item>
      </text:list>
      <text:p text:style-name="P10"/>
      <text:h text:style-name="P7" text:outline-level="2">11. Motor de recomendación híbrido</text:h>
      <text:list text:style-name="L11">
        <text:list-item>
          <text:p text:style-name="P25">Filtrado principal por mood predicho </text:p>
        </text:list-item>
        <text:list-item>
          <text:p text:style-name="P25">Filtrado secundario por contexto heurístico derivado </text:p>
        </text:list-item>
        <text:list-item>
          <text:p text:style-name="P26"><text:soft-page-break/>Ordenación opcional por popularidad </text:p>
        </text:list-item>
      </text:list>
      <text:p text:style-name="P10"/>
      <text:h text:style-name="P7" text:outline-level="2">12. Desplegar app Gradio</text:h>
      <text:p text:style-name="P5">Usuario podrá seleccionar:</text:p>
      <text:list text:style-name="L12">
        <text:list-item>
          <text:p text:style-name="P27">Cómo se siente (mood) </text:p>
        </text:list-item>
        <text:list-item>
          <text:p text:style-name="P28">Qué va a hacer (contexto) </text:p>
        </text:list-item>
      </text:list>
      <text:p text:style-name="P5">El sistema recomendará canciones según ambos criterios.</text:p>
      <text:p text:style-name="P10"/>
      <text:h text:style-name="P29" text:outline-level="1">Resumen ultra corto en una línea</text:h>
      <text:section text:style-name="Sect1" text:name="code-block-viewer">
        <text:p text:style-name="P30">Datasets → Kafka → S3 Bronze → Spark Silver → Spark Gold → RDS/Mongo → Modelo ML → Clasificación Mood/Contex</text:p>
      </text:section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fo:font-style="italic" fo:font-weight="bold" officeooo:rsid="0015bc00" officeooo:paragraph-rsid="0015bc00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Header">
      <style:text-properties officeooo:rsid="0015bc00" officeooo:paragraph-rsid="0015bc00"/>
    </style:style>
    <style:style style:name="MP3" style:family="paragraph">
      <style:paragraph-properties fo:text-align="center"/>
    </style:style>
    <style:style style:name="MP4" style:family="paragraph" style:parent-style-name="Footer">
      <style:text-properties officeooo:rsid="0015bc00" officeooo:paragraph-rsid="0015bc00"/>
    </style:style>
    <style:style style:name="MP5" style:family="paragraph" style:parent-style-name="Footer">
      <style:text-properties fo:font-size="10pt" fo:font-style="italic" fo:font-weight="bold" officeooo:rsid="0015bc00" officeooo:paragraph-rsid="0015bc00" style:font-size-asian="10pt" style:font-style-asian="italic" style:font-weight-asian="bold" style:font-size-complex="10pt" style:font-style-complex="italic" style:font-weight-complex="bold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thmane Rizqy<text:tab/><text:tab/>Desarrollo de aplicaciones multiplataforma</text:p>
        <text:p text:style-name="MP2"><draw:line text:anchor-type="paragraph" draw:z-index="2" draw:name="Línea horizontal 2" draw:style-name="Mgr1" draw:text-style-name="MP3" svg:x1="-0.007cm" svg:y1="0.531cm" svg:x2="16.988cm" svg:y2="0.531cm"><text:p/></draw:line></text:p>
      </style:header>
      <style:footer>
        <text:p text:style-name="MP4"><draw:line text:anchor-type="paragraph" draw:z-index="5" draw:name="Línea 1" draw:style-name="Mgr1" draw:text-style-name="MP3" svg:x1="0.014cm" svg:y1="0cm" svg:x2="16.988cm" svg:y2="0.021cm"><text:p/></draw:line></text:p>
        <text:p text:style-name="MP5">Pagina <text:page-number text:select-page="current">3</text:page-number><text:s/>de <text:page-count>3</text:page-count><text:tab/><text:tab/>I.E.S “Poligono Sur”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5T16:51:21.998786800</meta:creation-date>
    <dc:title>Plantilla_DAM_OFICIAL</dc:title>
    <meta:editing-duration>PT2H9M2S</meta:editing-duration>
    <meta:editing-cycles>5</meta:editing-cycles>
    <meta:generator>LibreOffice/26.2.2.2$Windows_X86_64 LibreOffice_project/1f77d10d6938fd34972958f64b2bcfa54f8b1ba5</meta:generator>
    <dc:date>2026-04-26T12:17:47.432344500</dc:date>
    <meta:document-statistic meta:table-count="0" meta:image-count="0" meta:object-count="0" meta:page-count="3" meta:paragraph-count="58" meta:word-count="364" meta:character-count="2425" meta:non-whitespace-character-count="2117"/>
    <meta:template xlink:type="simple" xlink:actuate="onRequest" xlink:title="Plantilla_DAM_OFICIAL" xlink:href="../../../../AppData/Roaming/LibreOffice/4/user/template/Plantilla_DAM_OFICIAL.ott" meta:date="2026-04-25T16:51:21.712272700"/>
  </office:meta>
</office:document-meta>
</file>