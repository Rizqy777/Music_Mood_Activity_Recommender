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top="0cm" fo:margin-bottom="0.247cm" style:contextual-spacing="false" fo:line-height="115%"/>
    </style:style>
    <style:style style:name="P2" style:family="paragraph" style:parent-style-name="Horizontal_20_Line">
      <style:paragraph-properties fo:margin-top="0cm" fo:margin-bottom="0.247cm" style:contextual-spacing="false" fo:line-height="115%"/>
    </style:style>
    <style:style style:name="P3" style:family="paragraph" style:parent-style-name="Heading_20_2">
      <style:paragraph-properties fo:margin-top="0cm" fo:margin-bottom="0.247cm" style:contextual-spacing="false" fo:line-height="115%"/>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1"/>
    <style:style style:name="P6" style:family="paragraph" style:parent-style-name="Heading_20_3">
      <style:paragraph-properties fo:margin-top="0cm" fo:margin-bottom="0.247cm" style:contextual-spacing="false" fo:line-height="115%"/>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2"/>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3"/>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4"/>
    <style:style style:name="P13" style:family="paragraph" style:parent-style-name="Quotations">
      <style:paragraph-properties fo:margin-top="0cm" fo:margin-bottom="0.247cm" style:contextual-spacing="false" fo:line-height="115%"/>
    </style:style>
    <style:style style:name="P14" style:family="paragraph" style:parent-style-name="Text_20_body" style:list-style-name="L5">
      <style:paragraph-properties fo:margin-top="0cm" fo:margin-bottom="0cm" style:contextual-spacing="false"/>
    </style:style>
    <style:style style:name="P15" style:family="paragraph" style:parent-style-name="Text_20_body" style:list-style-name="L5"/>
    <style:style style:name="P16" style:family="paragraph" style:parent-style-name="Text_20_body" style:list-style-name="L6">
      <style:paragraph-properties fo:margin-top="0cm" fo:margin-bottom="0cm" style:contextual-spacing="false"/>
    </style:style>
    <style:style style:name="P17" style:family="paragraph" style:parent-style-name="Text_20_body" style:list-style-name="L6"/>
    <style:style style:name="P18" style:family="paragraph" style:parent-style-name="Text_20_body" style:list-style-name="L7">
      <style:paragraph-properties fo:margin-top="0cm" fo:margin-bottom="0cm" style:contextual-spacing="false"/>
    </style:style>
    <style:style style:name="P19" style:family="paragraph" style:parent-style-name="Text_20_body" style:list-style-name="L7"/>
    <style:style style:name="P20" style:family="paragraph" style:parent-style-name="Text_20_body" style:list-style-name="L8">
      <style:paragraph-properties fo:margin-top="0cm" fo:margin-bottom="0cm" style:contextual-spacing="false"/>
    </style:style>
    <style:style style:name="P21" style:family="paragraph" style:parent-style-name="Text_20_body" style:list-style-name="L8"/>
    <style:style style:name="P22" style:family="paragraph" style:parent-style-name="Text_20_body" style:list-style-name="L9">
      <style:paragraph-properties fo:margin-top="0cm" fo:margin-bottom="0cm" style:contextual-spacing="false"/>
    </style:style>
    <style:style style:name="P23" style:family="paragraph" style:parent-style-name="Text_20_body" style:list-style-name="L9"/>
    <style:style style:name="P24" style:family="paragraph">
      <style:paragraph-properties fo:text-align="center"/>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vg:stroke-width="0.101cm" draw:marker-start-width="0.503cm" draw:marker-end-width="0.503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1. Visión del problema y selección de variables</text:h>
      <text:p text:style-name="P2"/>
      <text:h text:style-name="P3" text:outline-level="2">Definición del problema</text:h>
      <text:p text:style-name="Text_20_body">El objetivo de este proyecto es desarrollar un sistema de Machine Learning capaz de clasificar canciones según la emoción o estado de ánimo que transmiten, con el fin de construir un sistema de recomendación musical inteligente basado en emociones y contexto de uso.</text:p>
      <text:p text:style-name="Text_20_body">En concreto, el sistema analizará distintas características musicales de una canción y predecirá automáticamente a qué categoría emocional pertenece (por ejemplo: relajada, energética, melancólica, alegre, etc.). Posteriormente, dichas predicciones se aplicarán sobre un catálogo independiente de canciones reales para construir un recomendador musical capaz de sugerir canciones acordes tanto al estado emocional como a la actividad del usuario.</text:p>
      <text:p text:style-name="Text_20_body">Además de la clasificación emocional mediante Machine Learning, el sistema incorporará una capa adicional de clasificación contextual basada en reglas heurísticas diseñadas manualmente, permitiendo etiquetar canciones según escenarios de uso como entrenamiento, estudio, fiesta o relajación.</text:p>
      <text:p text:style-name="P2"/>
      <text:h text:style-name="P3" text:outline-level="2">Contexto y utilidad del problema</text:h>
      <text:p text:style-name="Text_20_body">La música mantiene una relación estrecha con el estado emocional humano y con el contexto en el que se consume. En la práctica, los usuarios no solo seleccionan música por artista o género, sino también en función de cómo desean sentirse o de la actividad que están realizando.</text:p>
      <text:p text:style-name="Text_20_body">Ejemplos habituales de uso son:</text:p>
      <text:list text:style-name="L1">
        <text:list-item>
          <text:p text:style-name="P4">Escuchar música energética para entrenar. </text:p>
        </text:list-item>
        <text:list-item>
          <text:p text:style-name="P4">Escuchar música relajante para estudiar. </text:p>
        </text:list-item>
        <text:list-item>
          <text:p text:style-name="P4">Escuchar música melancólica en momentos introspectivos. </text:p>
        </text:list-item>
        <text:list-item>
          <text:p text:style-name="P5">Escuchar música alegre en contextos sociales. </text:p>
        </text:list-item>
      </text:list>
      <text:p text:style-name="Text_20_body">Etiquetar manualmente millones de canciones según emoción o contexto es una tarea costosa, subjetiva y difícil de mantener actualizada. Por ello, resulta útil desarrollar un sistema automatizado capaz de inferir estas características a partir de atributos musicales cuantificables.</text:p>
      <text:p text:style-name="Text_20_body">Este proyecto busca resolver dicho problema mediante técnicas de Machine Learning supervisado combinadas con reglas de negocio sobre características acústicas.</text:p>
      <text:p text:style-name="P2"/>
      <text:h text:style-name="P3" text:outline-level="2">Tipo de problema de Machine Learning</text:h>
      <text:p text:style-name="Text_20_body">Este proyecto se plantea principalmente como un problema de:</text:p>
      <text:h text:style-name="P6" text:outline-level="3"><text:soft-page-break/>Clasificación Supervisada Multiclase</text:h>
      <text:p text:style-name="Text_20_body">Esto se debe a que:</text:p>
      <text:list text:style-name="L2">
        <text:list-item>
          <text:p text:style-name="P7">Existe un dataset previamente etiquetado con categorías emocionales. </text:p>
        </text:list-item>
        <text:list-item>
          <text:p text:style-name="P7">El modelo aprenderá la relación entre características musicales y emoción. </text:p>
        </text:list-item>
        <text:list-item>
          <text:p text:style-name="P8">La salida esperada pertenece a una de varias clases posibles. </text:p>
        </text:list-item>
      </text:list>
      <text:p text:style-name="P2"/>
      <text:h text:style-name="P6" text:outline-level="3">Formulación del problema</text:h>
      <text:p text:style-name="Text_20_body"><text:span text:style-name="Strong_20_Emphasis">Input:</text:span> características musicales de una canción<text:line-break/><text:span text:style-name="Strong_20_Emphasis">Output:</text:span> categoría emocional / mood de la canción</text:p>
      <text:p text:style-name="P2"/>
      <text:h text:style-name="P3" text:outline-level="2">Variable objetivo (Target)</text:h>
      <text:p text:style-name="Text_20_body">La variable objetivo del modelo será la categoría emocional o <text:span text:style-name="Strong_20_Emphasis">mood</text:span> asociada a cada canción.</text:p>
      <text:p text:style-name="Text_20_body">Esta variable representa la emoción predominante transmitida por la canción y será la clase que el modelo deberá predecir.</text:p>
      <text:p text:style-name="Text_20_body">Ejemplos de posibles etiquetas emocionales:</text:p>
      <text:list text:style-name="L3">
        <text:list-item>
          <text:p text:style-name="P9">Happy </text:p>
        </text:list-item>
        <text:list-item>
          <text:p text:style-name="P9">Sad </text:p>
        </text:list-item>
        <text:list-item>
          <text:p text:style-name="P9">Relaxed </text:p>
        </text:list-item>
        <text:list-item>
          <text:p text:style-name="P9">Energetic </text:p>
        </text:list-item>
        <text:list-item>
          <text:p text:style-name="P9">Calm </text:p>
        </text:list-item>
        <text:list-item>
          <text:p text:style-name="P10">Aggressive </text:p>
        </text:list-item>
      </text:list>
      <text:p text:style-name="Text_20_body">La variable objetivo será obtenida a partir del <text:span text:style-name="Strong_20_Emphasis">Mood Dataset</text:span>, dataset etiquetado que contiene canciones previamente clasificadas emocionalmente.</text:p>
      <text:p text:style-name="P2"/>
      <text:h text:style-name="P3" text:outline-level="2">Arquitectura de datasets y rol de cada fuente</text:h>
      <text:p text:style-name="Text_20_body">Para el desarrollo del sistema se emplearán dos datasets con funciones diferenciadas dentro del pipeline:</text:p>
      <text:p text:style-name="P2"/>
      <text:h text:style-name="P6" text:outline-level="3">Dataset 1 — Mood Dataset (Entrenamiento)</text:h>
      <text:p text:style-name="Text_20_body">Se utilizará como dataset supervisado de entrenamiento.</text:p>
      <text:p text:style-name="Text_20_body">Contiene:</text:p>
      <text:list text:style-name="L4">
        <text:list-item>
          <text:p text:style-name="P11">Audio features de canciones </text:p>
        </text:list-item>
        <text:list-item>
          <text:p text:style-name="P12"><text:soft-page-break/>Etiqueta emocional / mood asociada </text:p>
        </text:list-item>
      </text:list>
      <text:p text:style-name="Text_20_body">Función en el proyecto:</text:p>
      <text:p text:style-name="P13">Permitir al modelo aprender la relación entre características acústicas y emoción musical.</text:p>
      <text:p text:style-name="P2"/>
      <text:h text:style-name="P6" text:outline-level="3">Dataset 2 — Spotify Tracks Dataset (Catálogo de recomendación)</text:h>
      <text:p text:style-name="Text_20_body">Se utilizará como catálogo independiente de canciones reales sobre el que aplicar el modelo entrenado.</text:p>
      <text:p text:style-name="Text_20_body">Contiene:</text:p>
      <text:list text:style-name="L5">
        <text:list-item>
          <text:p text:style-name="P14">Información descriptiva de canciones </text:p>
        </text:list-item>
        <text:list-item>
          <text:p text:style-name="P14">Metadatos de artista / álbum / género </text:p>
        </text:list-item>
        <text:list-item>
          <text:p text:style-name="P14">Popularidad </text:p>
        </text:list-item>
        <text:list-item>
          <text:p text:style-name="P15">Audio features </text:p>
        </text:list-item>
      </text:list>
      <text:p text:style-name="Text_20_body">Función en el proyecto:</text:p>
      <text:p text:style-name="P13">Actuar como catálogo final de canciones recomendables una vez clasificadas emocionalmente por el modelo.</text:p>
      <text:p text:style-name="P2"/>
      <text:h text:style-name="P3" text:outline-level="2">Variables independientes (Features)</text:h>
      <text:p text:style-name="Text_20_body">Las variables independientes serán atributos acústicos extraídos originalmente de Spotify, ya que representan cuantitativamente propiedades musicales relevantes para la percepción emocional humana.</text:p>
      <text:p text:style-name="P2"/>
      <text:h text:style-name="P3" text:outline-level="2">Variables acústicas principales seleccionadas</text:h>
      <text:p text:style-name="P2"/>
      <text:h text:style-name="P6" text:outline-level="3">Danceability</text:h>
      <text:p text:style-name="Text_20_body">Indica qué tan adecuada es una canción para bailar en función de ritmo, estabilidad y regularidad.</text:p>
      <text:p text:style-name="Text_20_body"><text:span text:style-name="Strong_20_Emphasis">Justificación:</text:span><text:line-break/>Las canciones más bailables suelen asociarse con emociones activas, alegres o energéticas.</text:p>
      <text:p text:style-name="P2"/>
      <text:h text:style-name="P6" text:outline-level="3">Energy</text:h>
      <text:p text:style-name="Text_20_body">Mide la intensidad y actividad percibida de la canción.</text:p>
      <text:p text:style-name="Text_20_body"><text:soft-page-break/><text:span text:style-name="Strong_20_Emphasis">Justificación:</text:span><text:line-break/>Es una de las variables más directamente relacionadas con la activación emocional.</text:p>
      <text:p text:style-name="P2"/>
      <text:h text:style-name="P6" text:outline-level="3">Valence</text:h>
      <text:p text:style-name="Text_20_body">Representa la positividad emocional percibida de una canción.</text:p>
      <text:p text:style-name="Text_20_body"><text:span text:style-name="Strong_20_Emphasis">Justificación:</text:span><text:line-break/>Es la variable más vinculada a la dimensión emocional positiva/negativa.</text:p>
      <text:p text:style-name="P2"/>
      <text:h text:style-name="P6" text:outline-level="3">Tempo</text:h>
      <text:p text:style-name="Text_20_body">Velocidad de la canción en BPM.</text:p>
      <text:p text:style-name="Text_20_body"><text:span text:style-name="Strong_20_Emphasis">Justificación:</text:span><text:line-break/>Canciones rápidas suelen asociarse a emociones activas; lentas a estados calmados o tristes.</text:p>
      <text:p text:style-name="P2"/>
      <text:h text:style-name="P6" text:outline-level="3">Loudness</text:h>
      <text:p text:style-name="Text_20_body">Volumen medio de la canción.</text:p>
      <text:p text:style-name="Text_20_body"><text:span text:style-name="Strong_20_Emphasis">Justificación:</text:span><text:line-break/>Mayor volumen suele correlacionar con mayor intensidad emocional.</text:p>
      <text:p text:style-name="P2"/>
      <text:h text:style-name="P6" text:outline-level="3">Acousticness</text:h>
      <text:p text:style-name="Text_20_body">Probabilidad de que la canción sea acústica.</text:p>
      <text:p text:style-name="Text_20_body"><text:span text:style-name="Strong_20_Emphasis">Justificación:</text:span><text:line-break/>Las canciones acústicas suelen asociarse a emociones calmadas o íntimas.</text:p>
      <text:p text:style-name="P2"/>
      <text:h text:style-name="P6" text:outline-level="3">Instrumentalness</text:h>
      <text:p text:style-name="Text_20_body">Probabilidad de ausencia de voz.</text:p>
      <text:p text:style-name="Text_20_body"><text:span text:style-name="Strong_20_Emphasis">Justificación:</text:span><text:line-break/>Puede influir en la percepción emocional y ambiental de la canción.</text:p>
      <text:p text:style-name="P2"/>
      <text:h text:style-name="P6" text:outline-level="3">Speechiness</text:h>
      <text:p text:style-name="Text_20_body">Cantidad de voz hablada presente.</text:p>
      <text:p text:style-name="Text_20_body"><text:span text:style-name="Strong_20_Emphasis">Justificación:</text:span><text:line-break/>Permite distinguir entre formatos musicales más melódicos y otros más hablados/recitados.</text:p>
      <text:p text:style-name="P2"><text:soft-page-break/></text:p>
      <text:h text:style-name="P6" text:outline-level="3">Liveness</text:h>
      <text:p text:style-name="Text_20_body">Probabilidad de que la grabación sea en directo.</text:p>
      <text:p text:style-name="Text_20_body"><text:span text:style-name="Strong_20_Emphasis">Justificación:</text:span><text:line-break/>Puede aportar contexto adicional sobre la naturaleza interpretativa de la canción.</text:p>
      <text:p text:style-name="P2"/>
      <text:h text:style-name="P6" text:outline-level="3">Key / Mode</text:h>
      <text:p text:style-name="Text_20_body">Tonalidad y modalidad musical.</text:p>
      <text:p text:style-name="Text_20_body"><text:span text:style-name="Strong_20_Emphasis">Justificación:</text:span><text:line-break/>En teoría musical, tonalidades mayores y menores poseen asociaciones emocionales tradicionales.</text:p>
      <text:p text:style-name="P2"/>
      <text:h text:style-name="P6" text:outline-level="3">Duration_ms</text:h>
      <text:p text:style-name="Text_20_body">Duración de la canción.</text:p>
      <text:p text:style-name="Text_20_body"><text:span text:style-name="Strong_20_Emphasis">Justificación:</text:span><text:line-break/>Puede aportar contexto secundario sobre estructura o estilo musical.</text:p>
      <text:p text:style-name="P2"/>
      <text:h text:style-name="P3" text:outline-level="2">Variables complementarias de catálogo / recomendación</text:h>
      <text:p text:style-name="Text_20_body">Estas variables no necesariamente se utilizarán para entrenar el modelo principal, pero sí enriquecerán el sistema de recomendación final.</text:p>
      <text:p text:style-name="P2"/>
      <text:h text:style-name="P6" text:outline-level="3">Popularity</text:h>
      <text:p text:style-name="Text_20_body">Nivel de popularidad de la canción en Spotify.</text:p>
      <text:p text:style-name="Text_20_body"><text:span text:style-name="Strong_20_Emphasis">Justificación:</text:span><text:line-break/>Permite priorizar canciones más conocidas o relevantes dentro de un mismo filtro emocional/contextual.</text:p>
      <text:p text:style-name="P2"/>
      <text:h text:style-name="P6" text:outline-level="3">Track Genre</text:h>
      <text:p text:style-name="Text_20_body">Género principal de la canción.</text:p>
      <text:p text:style-name="Text_20_body"><text:span text:style-name="Strong_20_Emphasis">Justificación:</text:span><text:line-break/>Permite enriquecer el catálogo y facilitar futuras extensiones del recomendador.</text:p>
      <text:p text:style-name="P2"/>
      <text:h text:style-name="P6" text:outline-level="3"><text:soft-page-break/>Explicit</text:h>
      <text:p text:style-name="Text_20_body">Indica si la canción contiene contenido explícito.</text:p>
      <text:p text:style-name="Text_20_body"><text:span text:style-name="Strong_20_Emphasis">Justificación:</text:span><text:line-break/>Permite posibles filtros adicionales en la recomendación.</text:p>
      <text:p text:style-name="P2"/>
      <text:h text:style-name="P3" text:outline-level="2">Clasificación contextual heurística adicional</text:h>
      <text:p text:style-name="Text_20_body">Además de la clasificación emocional supervisada, el sistema implementará una segunda capa de clasificación contextual basada en reglas heurísticas definidas manualmente.</text:p>
      <text:p text:style-name="Text_20_body">Esta capa permitirá asignar etiquetas funcionales como:</text:p>
      <text:list text:style-name="L6">
        <text:list-item>
          <text:p text:style-name="P16">Workout </text:p>
        </text:list-item>
        <text:list-item>
          <text:p text:style-name="P16">Study </text:p>
        </text:list-item>
        <text:list-item>
          <text:p text:style-name="P16">Party </text:p>
        </text:list-item>
        <text:list-item>
          <text:p text:style-name="P16">Relax </text:p>
        </text:list-item>
        <text:list-item>
          <text:p text:style-name="P17">Sleep </text:p>
        </text:list-item>
      </text:list>
      <text:p text:style-name="Text_20_body">Estas etiquetas se generarán automáticamente a partir de combinaciones de audio features, por ejemplo:</text:p>
      <text:list text:style-name="L7">
        <text:list-item>
          <text:p text:style-name="P18">Canciones con alta energía y tempo elevado → Workout </text:p>
        </text:list-item>
        <text:list-item>
          <text:p text:style-name="P18">Canciones acústicas, lentas y de baja energía → Study / Relax </text:p>
        </text:list-item>
        <text:list-item>
          <text:p text:style-name="P19">Canciones con alta danceability y valence → Party </text:p>
        </text:list-item>
      </text:list>
      <text:p text:style-name="P2"/>
      <text:h text:style-name="P3" text:outline-level="2">Justificación global de selección de variables</text:h>
      <text:p text:style-name="Text_20_body">Las variables seleccionadas representan dimensiones musicales que influyen directamente en la percepción emocional y contextual de una canción.</text:p>
      <text:p text:style-name="Text_20_body">La emoción musical no depende de un único factor, sino de la combinación de múltiples dimensiones como:</text:p>
      <text:list text:style-name="L8">
        <text:list-item>
          <text:p text:style-name="P20">ritmo </text:p>
        </text:list-item>
        <text:list-item>
          <text:p text:style-name="P20">intensidad </text:p>
        </text:list-item>
        <text:list-item>
          <text:p text:style-name="P20">positividad </text:p>
        </text:list-item>
        <text:list-item>
          <text:p text:style-name="P20">velocidad </text:p>
        </text:list-item>
        <text:list-item>
          <text:p text:style-name="P20">tonalidad </text:p>
        </text:list-item>
        <text:list-item>
          <text:p text:style-name="P21">instrumentación </text:p>
        </text:list-item>
      </text:list>
      <text:p text:style-name="Text_20_body">El uso conjunto de estas variables permite modelar de forma robusta tanto la emoción como el posible contexto de uso de una canción.</text:p>
      <text:p text:style-name="P2"/>
      <text:h text:style-name="P3" text:outline-level="2"><text:soft-page-break/>Resultado esperado del sistema</text:h>
      <text:p text:style-name="Text_20_body">Una vez entrenado e integrado en el pipeline completo, el sistema será capaz de:</text:p>
      <text:list text:style-name="L9">
        <text:list-item>
          <text:p text:style-name="P22">Analizar canciones nuevas no etiquetadas del catálogo musical. </text:p>
        </text:list-item>
        <text:list-item>
          <text:p text:style-name="P22">Predecir automáticamente su categoría emocional. </text:p>
        </text:list-item>
        <text:list-item>
          <text:p text:style-name="P22">Generar etiquetas contextuales adicionales mediante reglas heurísticas. </text:p>
        </text:list-item>
        <text:list-item>
          <text:p text:style-name="P22">Construir un catálogo enriquecido de canciones clasificadas por mood y contexto. </text:p>
        </text:list-item>
        <text:list-item>
          <text:p text:style-name="P22">Recomendar canciones al usuario según: </text:p>
          <text:list>
            <text:list-item>
              <text:p text:style-name="P22">cómo se siente </text:p>
            </text:list-item>
            <text:list-item>
              <text:p text:style-name="P23">qué actividad va a realizar</text:p>
            </text:list-item>
          </text:list>
        </text:list-item>
      </text:list>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ize="10pt" fo:font-style="italic" fo:font-weight="bold" officeooo:rsid="0015bc00" officeooo:paragraph-rsid="0015bc00" style:font-size-asian="10pt" style:font-style-asian="italic" style:font-weight-asian="bold" style:font-size-complex="10pt" style:font-style-complex="italic" style:font-weight-complex="bold"/>
    </style:style>
    <style:style style:name="MP2" style:family="paragraph" style:parent-style-name="Header">
      <style:text-properties officeooo:rsid="0015bc00" officeooo:paragraph-rsid="0015bc00"/>
    </style:style>
    <style:style style:name="MP3" style:family="paragraph">
      <style:paragraph-properties fo:text-align="center"/>
    </style:style>
    <style:style style:name="MP4" style:family="paragraph" style:parent-style-name="Footer">
      <style:text-properties officeooo:rsid="0015bc00" officeooo:paragraph-rsid="0015bc00"/>
    </style:style>
    <style:style style:name="MP5" style:family="paragraph" style:parent-style-name="Footer">
      <style:text-properties fo:font-size="10pt" fo:font-style="italic" fo:font-weight="bold" officeooo:rsid="0015bc00" officeooo:paragraph-rsid="0015bc00" style:font-size-asian="10pt" style:font-style-asian="italic" style:font-weight-asian="bold" style:font-size-complex="10pt" style:font-style-complex="italic" style:font-weight-complex="bold"/>
    </style:style>
    <style:style style:name="MT1" style:family="text">
      <style:text-properties officeooo:rsid="00188191"/>
    </style:style>
    <style:style style:name="Mgr1" style:family="graphic">
      <style:graphic-properties svg:stroke-width="0.101cm" draw:marker-start-width="0.503cm" draw:marker-end-width="0.503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thmane Rizqy<text:tab/><text:tab/><text:span text:style-name="MT1">IA &amp; BIG DATA</text:span></text:p>
        <text:p text:style-name="MP2"><draw:line text:anchor-type="paragraph" draw:z-index="6" draw:name="Línea horizontal 2" draw:style-name="Mgr1" draw:text-style-name="MP3" svg:x1="-0.007cm" svg:y1="0.531cm" svg:x2="16.988cm" svg:y2="0.531cm"><text:p/></draw:line></text:p>
      </style:header>
      <style:footer>
        <text:p text:style-name="MP4"><draw:line text:anchor-type="paragraph" draw:z-index="13" draw:name="Línea 1" draw:style-name="Mgr1" draw:text-style-name="MP3" svg:x1="0.014cm" svg:y1="0cm" svg:x2="16.988cm" svg:y2="0.021cm"><text:p/></draw:line></text:p>
        <text:p text:style-name="MP5">Pagina <text:page-number text:select-page="current">7</text:page-number><text:s/>de <text:page-count>7</text:page-count><text:tab/><text:tab/>I.E.S “Poligono Su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26T11:21:30.551171400</meta:creation-date>
    <dc:title>Plantilla_DAM_OFICIAL</dc:title>
    <meta:editing-duration>PT2H18M55S</meta:editing-duration>
    <meta:editing-cycles>2</meta:editing-cycles>
    <meta:generator>LibreOffice/26.2.2.2$Windows_X86_64 LibreOffice_project/1f77d10d6938fd34972958f64b2bcfa54f8b1ba5</meta:generator>
    <dc:date>2026-04-26T14:59:49.137094100</dc:date>
    <meta:document-statistic meta:table-count="0" meta:image-count="0" meta:object-count="0" meta:page-count="7" meta:paragraph-count="132" meta:word-count="1131" meta:character-count="7975" meta:non-whitespace-character-count="6973"/>
    <meta:template xlink:type="simple" xlink:actuate="onRequest" xlink:title="Plantilla_DAM_OFICIAL" xlink:href="../../../../AppData/Roaming/LibreOffice/4/user/template/Plantilla_DAM_OFICIAL.ott" meta:date="2026-04-26T11:21:30.316670000"/>
  </office:meta>
</office:document-meta>
</file>